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b7e8f9" draw:textarea-vertical-align="top" draw:auto-grow-height="false" fo:min-height="1.183cm" fo:min-width="2.37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fe0e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ffe0b5" draw:textarea-vertical-align="top" draw:auto-grow-height="false" fo:min-height="1.014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.622cm" fo:min-width="2.40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ffe0b5" draw:textarea-vertical-align="top" draw:auto-grow-height="false" fo:min-height="1.014cm" fo:min-width="2.793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.622cm" fo:min-width="2.40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dbe0e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5f59d" draw:textarea-vertical-align="top" draw:auto-grow-height="false" fo:min-height="1.183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c6e8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1.375cm" fo:min-width="0.556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2.62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ffe0e0" draw:textarea-vertical-align="top" draw:auto-grow-height="false" fo:min-height="1.184cm" fo:min-width="2.288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.622cm" fo:min-width="3.34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1.453cm" fo:min-width="0.365cm" fo:padding-top="0.125cm" fo:padding-bottom="0.125cm" fo:padding-left="0.25cm" fo:padding-right="0.25cm" fo:wrap-option="wrap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 style:list-style-name="L2">
      <style:graphic-properties draw:stroke="none" svg:stroke-width="0cm" draw:fill="non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 style:list-style-name="L3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b7e8f9"/>
      <style:paragraph-properties fo:text-align="start"/>
      <style:text-properties fo:font-size="18pt"/>
    </style:style>
    <style:style style:name="P2" style:family="paragraph">
      <loext:graphic-properties draw:fill="solid" draw:fill-color="#ffe0e0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5" style:family="paragraph">
      <loext:graphic-properties draw:fill="solid" draw:fill-color="#ffe0b5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8" style:family="paragraph">
      <loext:graphic-properties draw:fill="solid" draw:fill-color="#dbe0e2"/>
      <style:paragraph-properties fo:text-align="start"/>
      <style:text-properties fo:font-size="18pt"/>
    </style:style>
    <style:style style:name="P9" style:family="paragraph">
      <loext:graphic-properties draw:fill="solid" draw:fill-color="#f5f59d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c6e8cc"/>
      <style:paragraph-properties fo:text-align="start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9" draw:style-name="gr1" draw:text-style-name="P1" draw:layer="layout" svg:width="4.059cm" svg:height="2.025cm" svg:x="6.736cm" svg:y="9.52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">
          <draw:custom-shape draw:name="CustomShape 4" draw:style-name="gr2" draw:text-style-name="P2" draw:layer="layout" svg:width="3.942cm" svg:height="2.026cm" svg:x="0.717cm" svg:y="5.08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gr3" draw:text-style-name="P4" draw:layer="layout" svg:width="3.848cm" svg:height="0.871cm" svg:x="0.88cm" svg:y="5.742cm">
            <text:p text:style-name="P3"><text:span text:style-name="T1"><text:s text:c="4"/></text:span><text:span text:style-name="T1">Recei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CustomShape 7" draw:style-name="gr4" draw:text-style-name="P5" draw:layer="layout" svg:width="3.841cm" svg:height="1.263cm" svg:x="6.488cm" svg:y="5.4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4" draw:layer="layout" svg:width="2.908cm" svg:height="0.871cm" svg:x="6.872cm" svg:y="5.742cm">
            <text:p text:style-name="P3"><text:span text:style-name="T1"><text:s text:c="2"/></text:span><text:span text:style-name="T1">Set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0" draw:style-name="gr6" draw:text-style-name="P7" draw:layer="layout" svg:width="3.419cm" svg:height="0.886cm" svg:x="7.085cm" svg:y="9.717cm">
          <text:p text:style-name="P6"><text:span text:style-name="T1">State </text:span><text:span text:style-name="T1">Estim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CustomShape 12" draw:style-name="gr7" draw:text-style-name="P5" draw:layer="layout" svg:width="3.292cm" svg:height="1.263cm" svg:x="16.165cm" svg:y="7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8" draw:text-style-name="P4" draw:layer="layout" svg:width="2.908cm" svg:height="0.871cm" svg:x="16.549cm" svg:y="7.723cm">
            <text:p text:style-name="P3"><text:span text:style-name="T1">Setpoin</text:span><text:span text:style-name="T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4" draw:style-name="gr9" draw:text-style-name="P8" draw:layer="layout" svg:width="3.342cm" svg:height="1.626cm" svg:x="20.268cm" svg:y="7.2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0" draw:text-style-name="P9" draw:layer="layout" svg:width="4.059cm" svg:height="2.025cm" svg:x="11.339cm" svg:y="7.08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7" draw:layer="layout" svg:width="4.066cm" svg:height="0.871cm" svg:x="11.393cm" svg:y="7.313cm">
          <text:p text:style-name="P6"><text:span text:style-name="T1">PID </text:span></text:p>
          <text:p text:style-name="P6"><text:span text:style-name="T2">Contro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0" draw:layer="layout" svg:width="0.756cm" svg:height="0.001cm" svg:x="15.404cm" svg:y="8.10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0" draw:layer="layout" svg:width="0.761cm" svg:height="0.005cm" svg:x="19.487cm" svg:y="8.05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3" draw:text-style-name="P11" draw:layer="layout" svg:width="2.738cm" svg:height="1.263cm" svg:x="24.769cm" svg:y="7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4" draw:text-style-name="P4" draw:layer="layout" svg:width="2.33cm" svg:height="0.871cm" svg:x="25.073cm" svg:y="7.617cm">
          <text:p text:style-name="P3"><text:span text:style-name="T1"><text:s text:c="2"/></text:span><text:span text:style-name="T1">E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0" draw:layer="layout" svg:width="0.03cm" svg:height="2.869cm" draw:transform="rotate (-1.5707963267949) translate (14.826cm 7.363cm)">
          <text:p/>
          <draw:enhanced-geometry draw:mirror-horizontal="false" draw:mirror-vertical="true" svg:viewBox="0 0 0 0" draw:text-areas="0 0 ?f5 ?f6" draw:type="ooxml-curvedConnector3" draw:modifiers="403217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29" draw:style-name="gr15" draw:text-style-name="P10" draw:layer="layout" svg:width="1.147cm" svg:height="0.001cm" svg:x="23.615cm" svg:y="8.07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5" draw:text-style-name="P10" draw:layer="layout" svg:width="1.819cm" svg:height="0.022cm" svg:x="4.664cm" svg:y="6.0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5" draw:text-style-name="P10" draw:layer="layout" svg:width="1.853cm" svg:height="0.006cm" svg:x="4.987cm" svg:y="10.40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6" draw:text-style-name="P10" draw:layer="layout" svg:width="1.055cm" svg:height="1.624cm" svg:x="10.334cm" svg:y="6.12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17" draw:text-style-name="P4" draw:layer="layout" svg:width="1.734cm" svg:height="0.799cm" svg:x="21.185cm" svg:y="7.719cm">
          <text:p text:style-name="P3"><text:span text:style-name="T1">Mix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0" draw:layer="layout" svg:width="0.765cm" svg:height="0.001cm" svg:x="15.399cm" svg:y="8.0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5" draw:text-style-name="P10" draw:layer="layout" svg:width="0.765cm" svg:height="0.001cm" svg:x="19.499cm" svg:y="8.0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8" draw:text-style-name="P10" draw:layer="layout" svg:width="0.03cm" svg:height="2.869cm" draw:transform="rotate (-1.5707963267949) translate (10.16cm 9.779cm)">
          <text:p/>
          <draw:enhanced-geometry draw:mirror-horizontal="false" draw:mirror-vertical="true" svg:viewBox="0 0 0 0" draw:text-areas="0 0 ?f5 ?f6" draw:type="ooxml-curvedConnector3" draw:modifiers="403217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Group 1">
          <draw:custom-shape draw:name="CustomShape 1" draw:style-name="gr19" draw:text-style-name="P2" draw:layer="layout" svg:width="3.942cm" svg:height="2.026cm" svg:x="1.069cm" svg:y="9.404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" draw:style-name="gr20" draw:text-style-name="P4" draw:layer="layout" svg:width="3.848cm" svg:height="0.871cm" svg:x="1.232cm" svg:y="10.066cm">
            <text:p text:style-name="P3"><text:span text:style-name="T1"><text:s text:c="4"/></text:span><text:span text:style-name="T1">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5" draw:style-name="gr21" draw:text-style-name="P10" draw:layer="layout" svg:width="0.864cm" svg:height="1.702cm" draw:transform="rotate (0.0818559419185341) translate (10.397cm 8.292cm)">
          <text:p text:style-name="P12"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PlaceHolder 1" draw:style-name="gr22" draw:layer="layout" svg:width="12.563cm" svg:height="9.423cm" svg:x="4.511cm" svg:y="3.493cm" draw:page-number="1" presentation:class="page"/>
          <draw:frame draw:name="PlaceHolder 2" presentation:style-name="pr1" draw:text-style-name="P13" draw:layer="layout" svg:width="17.263cm" svg:height="10.997cm" svg:x="2.161cm" svg:y="13.445cm" presentation:class="notes" presentation:placeholder="true" presentation:user-transformed="true">
            <draw:text-box/>
          </draw:frame>
          <draw:custom-shape draw:name="TextShape 3" draw:style-name="gr23" draw:text-style-name="P15" draw:layer="layout" svg:width="9.352cm" svg:height="1.397cm" svg:x="12.228cm" svg:y="26.538cm">
            <text:p text:style-name="P14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c__20_4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Centere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c__20_2_20_Content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20_Content_20_and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2_20_Content_20_over_20_Content" style:display-name="Title, 2 Content over Content" style:page-layout-name="PM1" draw:style-name="Mdp1">
      <draw:frame draw:name="PlaceHolder 1" presentation:style-name="Title_2c__20_2_20_Content_20_over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19.798cm" svg:height="11.136cm" svg:x="0.6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draw:frame draw:name="PlaceHolder 1" presentation:style-name="Title_2c__20_4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frame draw:name="PlaceHolder 1" presentation:style-name="Title_2c__20_6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3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3cm" svg:height="5.807cm" svg:x="9.921cm" svg:y="4.913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3cm" svg:height="5.807cm" svg:x="18.442cm" svg:y="4.913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3cm" svg:height="5.807cm" svg:x="1.4cm" svg:y="11.27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3cm" svg:height="5.807cm" svg:x="9.921cm" svg:y="11.27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3cm" svg:height="5.807cm" svg:x="18.442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0.001cm" svg:height="0.001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9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5.199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presentation:notes style:page-layout-name="PM2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draw:frame draw:name="PlaceHolder 1" presentation:style-name="Title_2c__20_2_20_Content_20_and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draw:frame draw:name="PlaceHolder 1" presentation:style-name="Title_20_Content_20_and_20_2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.001cm" svg:height="0.001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20:56:15</meta:creation-date>
    <meta:initial-creator>Levy, Simon</meta:initial-creator>
    <dc:language>en-US</dc:language>
    <dc:date>2026-04-11T22:52:43.134080719</dc:date>
    <meta:editing-cycles>58</meta:editing-cycles>
    <dc:title>PowerPoint Presentation</dc:title>
    <meta:editing-duration>P1DT3H46M38S</meta:editing-duration>
    <meta:generator>LibreOffice/7.3.7.2$Linux_X86_64 LibreOffice_project/30$Build-2</meta:generator>
    <meta:document-statistic meta:object-count="15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