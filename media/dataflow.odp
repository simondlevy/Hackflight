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rial" svg:font-family="Arial" style:font-pitch="variable"/>
    <style:font-face style:name="Arial1" svg:font-family="Arial"/>
    <style:font-face style:name="DejaVu Sans" svg:font-family="'DejaVu Sans'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cccccc" draw:textarea-vertical-align="top" draw:auto-grow-height="false" fo:min-height="1.183cm" fo:min-width="2.371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62cm" draw:stroke-linejoin="miter" svg:stroke-linecap="butt" draw:fill="solid" draw:fill-color="#c6d9f1" draw:opacity="4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62cm" draw:stroke-linejoin="miter" svg:stroke-linecap="butt" draw:fill="solid" draw:fill-color="#ddd9c3" draw:opacity="4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solid" draw:fill-color="#ccccc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2">
      <style:graphic-properties draw:stroke="none" svg:stroke-width="0cm" draw:fill="non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draw:stroke="none" svg:stroke-width="0cm" draw:fill="solid" draw:fill-color="#ff66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2">
      <style:graphic-properties draw:stroke="none" svg:stroke-width="0cm" draw:fill="non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>
      <style:graphic-properties draw:stroke="none" svg:stroke-width="0cm" draw:fill="solid" draw:fill-color="#729f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2">
      <style:graphic-properties draw:stroke="none" svg:stroke-width="0cm" draw:fill="non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 style:list-style-name="L2">
      <style:graphic-properties draw:stroke="none" svg:stroke-width="0cm" draw:fill="non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2">
      <style:graphic-properties draw:stroke="none" svg:stroke-width="0cm" draw:fill="non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butt" draw:fill="none" draw:textarea-vertical-align="top" draw:auto-grow-height="false" fo:min-height="2.62cm" fo:min-width="0cm" fo:padding-top="0.125cm" fo:padding-bottom="0.125cm" fo:padding-left="0.25cm" fo:padding-right="0.25cm" fo:wrap-option="wrap"/>
    </style:style>
    <style:style style:name="gr21" style:family="graphic">
      <style:graphic-properties style:protect="size"/>
    </style:style>
    <style:style style:name="gr22" style:family="graphic" style:parent-style-name="standard" style:list-style-name="L2">
      <style:graphic-properties draw:stroke="none" svg:stroke-width="0cm" draw:fill="none" draw:textarea-horizontal-align="justify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 style:list-style-name="L3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1" style:family="paragraph">
      <loext:graphic-properties draw:fill="solid" draw:fill-color="#cccccc"/>
      <style:paragraph-properties fo:text-align="start"/>
      <style:text-properties fo:font-size="18pt"/>
    </style:style>
    <style:style style:name="P2" style:family="paragraph">
      <loext:graphic-properties draw:fill="solid" draw:fill-color="#c6d9f1" draw:opacity="40%"/>
      <style:paragraph-properties fo:text-align="start"/>
      <style:text-properties fo:font-size="18pt"/>
    </style:style>
    <style:style style:name="P3" style:family="paragraph">
      <loext:graphic-properties draw:fill="solid" draw:fill-color="#ddd9c3" draw:opacity="40%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P6" style:family="paragraph">
      <loext:graphic-properties draw:fill="solid" draw:fill-color="#ff6600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8pt"/>
    </style:style>
    <style:style style:name="P9" style:family="paragraph">
      <loext:graphic-properties draw:fill="solid" draw:fill-color="#729fcf"/>
      <style:paragraph-properties fo:text-align="start"/>
      <style:text-properties fo:font-size="1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2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8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32pt" fo:letter-spacing="normal" fo:language="en" fo:country="US" fo:font-style="italic" style:text-underline-style="none" fo:font-weight="normal" fo:background-color="transparent" style:font-name-asian="DejaVu Sans" style:font-size-asian="32pt" style:font-style-asian="italic" style:font-weight-asian="normal" style:font-name-complex="DejaVu Sans" style:font-size-complex="32pt" style:font-style-complex="italic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5pt" fo:letter-spacing="normal" fo:language="en" fo:country="US" fo:font-style="normal" style:text-underline-style="none" fo:font-weight="normal" fo:background-color="transparent" style:font-name-asian="DejaVu Sans" style:font-size-asian="15pt" style:font-style-asian="normal" style:font-weight-asian="normal" style:font-name-complex="DejaVu Sans" style:font-size-complex="15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normal" fo:background-color="transparent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1" fo:font-size="12pt" fo:letter-spacing="normal" fo:language="en" fo:country="US" fo:font-style="normal" style:text-underline-style="none" fo:font-weight="normal" fo:background-color="transparent" style:font-name-asian="+mn-ea1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9" draw:style-name="gr1" draw:text-style-name="P1" draw:layer="layout" svg:width="4.059cm" svg:height="2.025cm" svg:x="6.736cm" svg:y="9.525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" draw:style-name="gr2" draw:text-style-name="P2" draw:layer="layout" svg:width="27.997cm" svg:height="11.804cm" svg:x="-0.022cm" svg:y="1.6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3" draw:layer="layout" svg:width="18.549cm" svg:height="8.395cm" svg:x="5.665cm" svg:y="3.9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>
          <draw:custom-shape draw:name="CustomShape 4" draw:style-name="gr4" draw:text-style-name="P1" draw:layer="layout" svg:width="3.942cm" svg:height="2.026cm" svg:x="0.717cm" svg:y="5.08cm">
            <text:p/>
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5" draw:style-name="gr5" draw:text-style-name="P5" draw:layer="layout" svg:width="3.848cm" svg:height="0.871cm" svg:x="0.88cm" svg:y="5.742cm">
            <text:p text:style-name="P4"><text:span text:style-name="T1"><text:s text:c="4"/></text:span><text:span text:style-name="T1">Receiv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">
          <draw:custom-shape draw:name="CustomShape 7" draw:style-name="gr6" draw:text-style-name="P6" draw:layer="layout" svg:width="3.841cm" svg:height="1.263cm" svg:x="6.488cm" svg:y="5.48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" draw:style-name="gr7" draw:text-style-name="P5" draw:layer="layout" svg:width="2.908cm" svg:height="0.871cm" svg:x="6.872cm" svg:y="5.742cm">
            <text:p text:style-name="P4"><text:span text:style-name="T1"><text:s text:c="2"/></text:span><text:span text:style-name="T1">Demand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CustomShape 10" draw:style-name="gr8" draw:text-style-name="P8" draw:layer="layout" svg:width="3.419cm" svg:height="0.886cm" svg:x="7.085cm" svg:y="9.717cm">
          <text:p text:style-name="P7"><text:span text:style-name="T1">State Estim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>
          <draw:custom-shape draw:name="CustomShape 12" draw:style-name="gr6" draw:text-style-name="P6" draw:layer="layout" svg:width="3.292cm" svg:height="1.263cm" svg:x="16.165cm" svg:y="7.4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" draw:style-name="gr9" draw:text-style-name="P5" draw:layer="layout" svg:width="2.908cm" svg:height="0.871cm" svg:x="16.549cm" svg:y="7.723cm">
            <text:p text:style-name="P4"><text:span text:style-name="T1">Demand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CustomShape 14" draw:style-name="gr10" draw:text-style-name="P9" draw:layer="layout" svg:width="3.342cm" svg:height="1.626cm" svg:x="20.268cm" svg:y="7.25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11" draw:text-style-name="P5" draw:layer="layout" svg:width="4.155cm" svg:height="1.162cm" svg:x="13.258cm" svg:y="4.228cm">
          <text:p text:style-name="P4"><text:span text:style-name="T2">Co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" draw:text-style-name="P1" draw:layer="layout" svg:width="4.059cm" svg:height="2.025cm" svg:x="11.339cm" svg:y="7.087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7" draw:style-name="gr12" draw:text-style-name="P8" draw:layer="layout" svg:width="4.066cm" svg:height="0.871cm" svg:x="11.393cm" svg:y="7.313cm">
          <text:p text:style-name="P7"><text:span text:style-name="T1">PID </text:span></text:p>
          <text:p text:style-name="P7"><text:span text:style-name="T3">Controll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" draw:text-style-name="P1" draw:layer="layout" svg:width="4.82cm" svg:height="3.042cm" svg:x="0.162cm" svg:y="8.9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13" draw:text-style-name="P5" draw:layer="layout" svg:width="2.565cm" svg:height="0.871cm" svg:x="1.339cm" svg:y="9.078cm">
          <text:p text:style-name="P4"><text:span text:style-name="T1">Senso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0" draw:text-style-name="P9" draw:layer="layout" svg:width="2.177cm" svg:height="1.164cm" svg:x="1.419cm" svg:y="10.041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" draw:style-name="gr14" draw:text-style-name="P5" draw:layer="layout" svg:width="1.464cm" svg:height="0.803cm" svg:x="1.806cm" svg:y="10.199cm">
          <text:p text:style-name="P4"><text:span text:style-name="T1">I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5" draw:text-style-name="P10" draw:layer="layout" svg:width="0.756cm" svg:height="0.001cm" svg:x="15.404cm" svg:y="8.10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15" draw:text-style-name="P10" draw:layer="layout" svg:width="0.761cm" svg:height="0.005cm" svg:x="19.487cm" svg:y="8.06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10" draw:text-style-name="P9" draw:layer="layout" svg:width="2.738cm" svg:height="1.263cm" svg:x="24.769cm" svg:y="7.4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6" draw:text-style-name="P5" draw:layer="layout" svg:width="2.33cm" svg:height="0.871cm" svg:x="25.073cm" svg:y="7.617cm">
          <text:p text:style-name="P4"><text:span text:style-name="T1"><text:s text:c="2"/></text:span><text:span text:style-name="T1">ES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7" draw:text-style-name="P10" draw:layer="layout" svg:width="0.03cm" svg:height="2.869cm" draw:transform="rotate (-1.5707963267949) translate (14.826cm 7.363cm)">
          <text:p/>
          <draw:enhanced-geometry draw:mirror-horizontal="false" draw:mirror-vertical="true" svg:viewBox="0 0 0 0" draw:text-areas="0 0 ?f5 ?f6" draw:type="ooxml-curvedConnector3" draw:modifiers="403217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inimum="-2147483647" draw:handle-range-x-maximum="2147483647" draw:handle-position="?f0 ?f4"/>
          </draw:enhanced-geometry>
        </draw:custom-shape>
        <draw:custom-shape draw:name="CustomShape 29" draw:style-name="gr17" draw:text-style-name="P10" draw:layer="layout" svg:width="1.147cm" svg:height="0.001cm" svg:x="23.615cm" svg:y="8.07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0" draw:style-name="gr17" draw:text-style-name="P10" draw:layer="layout" svg:width="1.819cm" svg:height="0.022cm" svg:x="4.664cm" svg:y="6.09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17" draw:text-style-name="P10" draw:layer="layout" svg:width="1.853cm" svg:height="0.006cm" svg:x="4.987cm" svg:y="10.40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17" draw:text-style-name="P10" draw:layer="layout" svg:width="1.055cm" svg:height="1.624cm" svg:x="10.334cm" svg:y="6.12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3" draw:style-name="gr17" draw:text-style-name="P10" draw:layer="layout" svg:width="1.238cm" svg:height="1.588cm" svg:x="10.691cm" svg:y="8.816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4" draw:style-name="gr18" draw:text-style-name="P5" draw:layer="layout" svg:width="1.734cm" svg:height="0.799cm" svg:x="21.185cm" svg:y="7.719cm">
          <text:p text:style-name="P4"><text:span text:style-name="T1">Mix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19" draw:text-style-name="P5" draw:layer="layout" svg:width="6.496cm" svg:height="1.162cm" svg:x="11.258cm" svg:y="2.022cm">
          <text:p text:style-name="P4"><text:span text:style-name="T4">Hardw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" draw:text-style-name="P10" draw:layer="layout" svg:width="0.765cm" svg:height="0.001cm" svg:x="15.399cm" svg:y="8.095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17" draw:text-style-name="P10" draw:layer="layout" svg:width="0.765cm" svg:height="0.001cm" svg:x="19.499cm" svg:y="8.095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20" draw:text-style-name="P10" draw:layer="layout" svg:width="0.03cm" svg:height="2.869cm" draw:transform="rotate (-1.5707963267949) translate (10.16cm 9.779cm)">
          <text:p/>
          <draw:enhanced-geometry draw:mirror-horizontal="false" draw:mirror-vertical="true" svg:viewBox="0 0 0 0" draw:text-areas="0 0 ?f5 ?f6" draw:type="ooxml-curvedConnector3" draw:modifiers="403217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inimum="-2147483647" draw:handle-range-x-maximum="2147483647" draw:handle-position="?f0 ?f4"/>
          </draw:enhanced-geometry>
        </draw:custom-shape>
        <presentation:notes draw:style-name="dp2">
          <draw:page-thumbnail draw:name="PlaceHolder 1" draw:style-name="gr21" draw:layer="layout" svg:width="12.563cm" svg:height="9.423cm" svg:x="4.511cm" svg:y="3.493cm" draw:page-number="1" presentation:class="page"/>
          <draw:frame draw:name="PlaceHolder 2" presentation:style-name="pr1" draw:text-style-name="P11" draw:layer="layout" svg:width="17.263cm" svg:height="10.997cm" svg:x="2.161cm" svg:y="13.445cm" presentation:class="notes" presentation:placeholder="true" presentation:user-transformed="true">
            <draw:text-box/>
          </draw:frame>
          <draw:custom-shape draw:name="TextShape 3" draw:style-name="gr22" draw:text-style-name="P13" draw:layer="layout" svg:width="9.352cm" svg:height="1.397cm" svg:x="12.228cm" svg:y="26.538cm">
            <text:p text:style-name="P12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rial" svg:font-family="Arial" style:font-pitch="variable"/>
    <style:font-face style:name="Arial1" svg:font-family="Arial"/>
    <style:font-face style:name="DejaVu Sans" svg:font-family="'DejaVu Sans'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2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c__20_2_20_Content_20_over_20_Content-background" style:display-name="Title, 2 Content over Content-background" style:family="presentation">
      <style:graphic-properties draw:stroke="none" draw:fill="solid" draw:fill-color="#ffffff"/>
      <style:text-properties style:letter-kerning="true"/>
    </style:style>
    <style:style style:name="Title_2c__20_2_20_Content_20_over_20_Content-backgroundobjects" style:display-name="Title, 2 Content over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_20_over_20_Content-notes" style:display-name="Title, 2 Content over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outline1" style:display-name="Title, 2 Content over Content-outline1" style:family="presentation">
      <style:graphic-properties draw:stroke="none" draw:fill="none" draw:auto-grow-height="false" draw:fit-to-size="false" style:shrink-to-fit="true">
        <text:list-style style:name="Title_2c__20_2_20_Content_20_over_20_Content-outline1" style:display-name="Title, 2 Content over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outline2" style:display-name="Title, 2 Content over Content-outline2" style:family="presentation" style:parent-style-name="Title_2c__20_2_20_Content_20_over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2_20_Content_20_over_20_Content-outline3" style:display-name="Title, 2 Content over Content-outline3" style:family="presentation" style:parent-style-name="Title_2c__20_2_20_Content_20_over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2_20_Content_20_over_20_Content-outline4" style:display-name="Title, 2 Content over Content-outline4" style:family="presentation" style:parent-style-name="Title_2c__20_2_20_Content_20_over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2_20_Content_20_over_20_Content-outline5" style:display-name="Title, 2 Content over Content-outline5" style:family="presentation" style:parent-style-name="Title_2c__20_2_20_Content_20_over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6" style:display-name="Title, 2 Content over Content-outline6" style:family="presentation" style:parent-style-name="Title_2c__20_2_20_Content_20_over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7" style:display-name="Title, 2 Content over Content-outline7" style:family="presentation" style:parent-style-name="Title_2c__20_2_20_Content_20_over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8" style:display-name="Title, 2 Content over Content-outline8" style:family="presentation" style:parent-style-name="Title_2c__20_2_20_Content_20_over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9" style:display-name="Title, 2 Content over Content-outline9" style:family="presentation" style:parent-style-name="Title_2c__20_2_20_Content_20_over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subtitle" style:display-name="Title, 2 Content over Content-subtitle" style:family="presentation">
      <style:graphic-properties draw:stroke="none" draw:fill="none" draw:textarea-vertical-align="middle">
        <text:list-style style:name="Title_2c__20_2_20_Content_20_over_20_Content-subtitle" style:display-name="Title, 2 Content over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title" style:display-name="Title, 2 Content over Content-title" style:family="presentation">
      <style:graphic-properties draw:stroke="none" draw:fill="none" draw:textarea-vertical-align="middle">
        <text:list-style style:name="Title_2c__20_2_20_Content_20_over_20_Content-title" style:display-name="Title, 2 Content over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background" style:display-name="Title, Content over Content-background" style:family="presentation">
      <style:graphic-properties draw:stroke="none" draw:fill="solid" draw:fill-color="#ffffff"/>
      <style:text-properties style:letter-kerning="true"/>
    </style:style>
    <style:style style:name="Title_2c__20_Content_20_over_20_Content-backgroundobjects" style:display-name="Title, Content over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20_over_20_Content-notes" style:display-name="Title, Content over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outline1" style:display-name="Title, Content over Content-outline1" style:family="presentation">
      <style:graphic-properties draw:stroke="none" draw:fill="none" draw:auto-grow-height="false" draw:fit-to-size="false" style:shrink-to-fit="true">
        <text:list-style style:name="Title_2c__20_Content_20_over_20_Content-outline1" style:display-name="Title, Content over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outline2" style:display-name="Title, Content over Content-outline2" style:family="presentation" style:parent-style-name="Title_2c__20_Content_20_over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_20_over_20_Content-outline3" style:display-name="Title, Content over Content-outline3" style:family="presentation" style:parent-style-name="Title_2c__20_Content_20_over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_20_over_20_Content-outline4" style:display-name="Title, Content over Content-outline4" style:family="presentation" style:parent-style-name="Title_2c__20_Content_20_over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_20_over_20_Content-outline5" style:display-name="Title, Content over Content-outline5" style:family="presentation" style:parent-style-name="Title_2c__20_Content_20_over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6" style:display-name="Title, Content over Content-outline6" style:family="presentation" style:parent-style-name="Title_2c__20_Content_20_over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7" style:display-name="Title, Content over Content-outline7" style:family="presentation" style:parent-style-name="Title_2c__20_Content_20_over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8" style:display-name="Title, Content over Content-outline8" style:family="presentation" style:parent-style-name="Title_2c__20_Content_20_over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9" style:display-name="Title, Content over Content-outline9" style:family="presentation" style:parent-style-name="Title_2c__20_Content_20_over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subtitle" style:display-name="Title, Content over Content-subtitle" style:family="presentation">
      <style:graphic-properties draw:stroke="none" draw:fill="none" draw:textarea-vertical-align="middle">
        <text:list-style style:name="Title_2c__20_Content_20_over_20_Content-subtitle" style:display-name="Title, Content over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title" style:display-name="Title, Content over Content-title" style:family="presentation">
      <style:graphic-properties draw:stroke="none" draw:fill="none" draw:textarea-vertical-align="middle">
        <text:list-style style:name="Title_2c__20_Content_20_over_20_Content-title" style:display-name="Title, Content over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4_20_Content-background" style:display-name="Title, 4 Content-background" style:family="presentation">
      <style:graphic-properties draw:stroke="none" draw:fill="solid" draw:fill-color="#ffffff"/>
      <style:text-properties style:letter-kerning="true"/>
    </style:style>
    <style:style style:name="Title_2c__20_4_20_Content-backgroundobjects" style:display-name="Title, 4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4_20_Content-notes" style:display-name="Title, 4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4_20_Content-outline1" style:display-name="Title, 4 Content-outline1" style:family="presentation">
      <style:graphic-properties draw:stroke="none" draw:fill="none" draw:auto-grow-height="false" draw:fit-to-size="false" style:shrink-to-fit="true">
        <text:list-style style:name="Title_2c__20_4_20_Content-outline1" style:display-name="Title, 4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4_20_Content-outline2" style:display-name="Title, 4 Content-outline2" style:family="presentation" style:parent-style-name="Title_2c__20_4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4_20_Content-outline3" style:display-name="Title, 4 Content-outline3" style:family="presentation" style:parent-style-name="Title_2c__20_4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4_20_Content-outline4" style:display-name="Title, 4 Content-outline4" style:family="presentation" style:parent-style-name="Title_2c__20_4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4_20_Content-outline5" style:display-name="Title, 4 Content-outline5" style:family="presentation" style:parent-style-name="Title_2c__20_4_20_Content-outline4">
      <style:paragraph-properties fo:margin-top="0.1cm" fo:margin-bottom="0cm"/>
      <style:text-properties fo:font-size="20pt" style:font-size-asian="20pt" style:font-size-complex="20pt"/>
    </style:style>
    <style:style style:name="Title_2c__20_4_20_Content-outline6" style:display-name="Title, 4 Content-outline6" style:family="presentation" style:parent-style-name="Title_2c__20_4_20_Content-outline5">
      <style:paragraph-properties fo:margin-top="0.1cm" fo:margin-bottom="0cm"/>
      <style:text-properties fo:font-size="20pt" style:font-size-asian="20pt" style:font-size-complex="20pt"/>
    </style:style>
    <style:style style:name="Title_2c__20_4_20_Content-outline7" style:display-name="Title, 4 Content-outline7" style:family="presentation" style:parent-style-name="Title_2c__20_4_20_Content-outline6">
      <style:paragraph-properties fo:margin-top="0.1cm" fo:margin-bottom="0cm"/>
      <style:text-properties fo:font-size="20pt" style:font-size-asian="20pt" style:font-size-complex="20pt"/>
    </style:style>
    <style:style style:name="Title_2c__20_4_20_Content-outline8" style:display-name="Title, 4 Content-outline8" style:family="presentation" style:parent-style-name="Title_2c__20_4_20_Content-outline7">
      <style:paragraph-properties fo:margin-top="0.1cm" fo:margin-bottom="0cm"/>
      <style:text-properties fo:font-size="20pt" style:font-size-asian="20pt" style:font-size-complex="20pt"/>
    </style:style>
    <style:style style:name="Title_2c__20_4_20_Content-outline9" style:display-name="Title, 4 Content-outline9" style:family="presentation" style:parent-style-name="Title_2c__20_4_20_Content-outline8">
      <style:paragraph-properties fo:margin-top="0.1cm" fo:margin-bottom="0cm"/>
      <style:text-properties fo:font-size="20pt" style:font-size-asian="20pt" style:font-size-complex="20pt"/>
    </style:style>
    <style:style style:name="Title_2c__20_4_20_Content-subtitle" style:display-name="Title, 4 Content-subtitle" style:family="presentation">
      <style:graphic-properties draw:stroke="none" draw:fill="none" draw:textarea-vertical-align="middle">
        <text:list-style style:name="Title_2c__20_4_20_Content-subtitle" style:display-name="Title, 4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4_20_Content-title" style:display-name="Title, 4 Content-title" style:family="presentation">
      <style:graphic-properties draw:stroke="none" draw:fill="none" draw:textarea-vertical-align="middle">
        <text:list-style style:name="Title_2c__20_4_20_Content-title" style:display-name="Title, 4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6_20_Content-background" style:display-name="Title, 6 Content-background" style:family="presentation">
      <style:graphic-properties draw:stroke="none" draw:fill="solid" draw:fill-color="#ffffff"/>
      <style:text-properties style:letter-kerning="true"/>
    </style:style>
    <style:style style:name="Title_2c__20_6_20_Content-backgroundobjects" style:display-name="Title, 6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6_20_Content-notes" style:display-name="Title, 6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1" style:display-name="Title, 6 Content-outline1" style:family="presentation">
      <style:graphic-properties draw:stroke="none" draw:fill="none" draw:auto-grow-height="false" draw:fit-to-size="false" style:shrink-to-fit="true">
        <text:list-style style:name="Title_2c__20_6_20_Content-outline1" style:display-name="Title, 6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2" style:display-name="Title, 6 Content-outline2" style:family="presentation" style:parent-style-name="Title_2c__20_6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6_20_Content-outline3" style:display-name="Title, 6 Content-outline3" style:family="presentation" style:parent-style-name="Title_2c__20_6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6_20_Content-outline4" style:display-name="Title, 6 Content-outline4" style:family="presentation" style:parent-style-name="Title_2c__20_6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6_20_Content-outline5" style:display-name="Title, 6 Content-outline5" style:family="presentation" style:parent-style-name="Title_2c__20_6_20_Content-outline4">
      <style:paragraph-properties fo:margin-top="0.1cm" fo:margin-bottom="0cm"/>
      <style:text-properties fo:font-size="20pt" style:font-size-asian="20pt" style:font-size-complex="20pt"/>
    </style:style>
    <style:style style:name="Title_2c__20_6_20_Content-outline6" style:display-name="Title, 6 Content-outline6" style:family="presentation" style:parent-style-name="Title_2c__20_6_20_Content-outline5">
      <style:paragraph-properties fo:margin-top="0.1cm" fo:margin-bottom="0cm"/>
      <style:text-properties fo:font-size="20pt" style:font-size-asian="20pt" style:font-size-complex="20pt"/>
    </style:style>
    <style:style style:name="Title_2c__20_6_20_Content-outline7" style:display-name="Title, 6 Content-outline7" style:family="presentation" style:parent-style-name="Title_2c__20_6_20_Content-outline6">
      <style:paragraph-properties fo:margin-top="0.1cm" fo:margin-bottom="0cm"/>
      <style:text-properties fo:font-size="20pt" style:font-size-asian="20pt" style:font-size-complex="20pt"/>
    </style:style>
    <style:style style:name="Title_2c__20_6_20_Content-outline8" style:display-name="Title, 6 Content-outline8" style:family="presentation" style:parent-style-name="Title_2c__20_6_20_Content-outline7">
      <style:paragraph-properties fo:margin-top="0.1cm" fo:margin-bottom="0cm"/>
      <style:text-properties fo:font-size="20pt" style:font-size-asian="20pt" style:font-size-complex="20pt"/>
    </style:style>
    <style:style style:name="Title_2c__20_6_20_Content-outline9" style:display-name="Title, 6 Content-outline9" style:family="presentation" style:parent-style-name="Title_2c__20_6_20_Content-outline8">
      <style:paragraph-properties fo:margin-top="0.1cm" fo:margin-bottom="0cm"/>
      <style:text-properties fo:font-size="20pt" style:font-size-asian="20pt" style:font-size-complex="20pt"/>
    </style:style>
    <style:style style:name="Title_2c__20_6_20_Content-subtitle" style:display-name="Title, 6 Content-subtitle" style:family="presentation">
      <style:graphic-properties draw:stroke="none" draw:fill="none" draw:textarea-vertical-align="middle">
        <text:list-style style:name="Title_2c__20_6_20_Content-subtitle" style:display-name="Title, 6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title" style:display-name="Title, 6 Content-title" style:family="presentation">
      <style:graphic-properties draw:stroke="none" draw:fill="none" draw:textarea-vertical-align="middle">
        <text:list-style style:name="Title_2c__20_6_20_Content-title" style:display-name="Title, 6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solid" draw:fill-color="#ffffff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false" style:shrink-to-fit="true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entered_20_Text-background" style:display-name="Centered Text-background" style:family="presentation">
      <style:graphic-properties draw:stroke="none" draw:fill="solid" draw:fill-color="#ffffff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false" style:shrink-to-fit="true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.1cm" fo:margin-bottom="0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.1cm" fo:margin-bottom="0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.1cm" fo:margin-bottom="0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.1cm" fo:margin-bottom="0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.1cm" fo:margin-bottom="0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background" style:display-name="Title, 2 Content and Content-background" style:family="presentation">
      <style:graphic-properties draw:stroke="none" draw:fill="solid" draw:fill-color="#ffffff"/>
      <style:text-properties style:letter-kerning="true"/>
    </style:style>
    <style:style style:name="Title_2c__20_2_20_Content_20_and_20_Content-backgroundobjects" style:display-name="Title, 2 Content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_20_and_20_Content-notes" style:display-name="Title, 2 Content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outline1" style:display-name="Title, 2 Content and Content-outline1" style:family="presentation">
      <style:graphic-properties draw:stroke="none" draw:fill="none" draw:auto-grow-height="false" draw:fit-to-size="false" style:shrink-to-fit="true">
        <text:list-style style:name="Title_2c__20_2_20_Content_20_and_20_Content-outline1" style:display-name="Title, 2 Content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outline2" style:display-name="Title, 2 Content and Content-outline2" style:family="presentation" style:parent-style-name="Title_2c__20_2_20_Content_20_and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2_20_Content_20_and_20_Content-outline3" style:display-name="Title, 2 Content and Content-outline3" style:family="presentation" style:parent-style-name="Title_2c__20_2_20_Content_20_and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2_20_Content_20_and_20_Content-outline4" style:display-name="Title, 2 Content and Content-outline4" style:family="presentation" style:parent-style-name="Title_2c__20_2_20_Content_20_and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2_20_Content_20_and_20_Content-outline5" style:display-name="Title, 2 Content and Content-outline5" style:family="presentation" style:parent-style-name="Title_2c__20_2_20_Content_20_and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6" style:display-name="Title, 2 Content and Content-outline6" style:family="presentation" style:parent-style-name="Title_2c__20_2_20_Content_20_and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7" style:display-name="Title, 2 Content and Content-outline7" style:family="presentation" style:parent-style-name="Title_2c__20_2_20_Content_20_and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8" style:display-name="Title, 2 Content and Content-outline8" style:family="presentation" style:parent-style-name="Title_2c__20_2_20_Content_20_and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9" style:display-name="Title, 2 Content and Content-outline9" style:family="presentation" style:parent-style-name="Title_2c__20_2_20_Content_20_and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subtitle" style:display-name="Title, 2 Content and Content-subtitle" style:family="presentation">
      <style:graphic-properties draw:stroke="none" draw:fill="none" draw:textarea-vertical-align="middle">
        <text:list-style style:name="Title_2c__20_2_20_Content_20_and_20_Content-subtitle" style:display-name="Title, 2 Content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title" style:display-name="Title, 2 Content and Content-title" style:family="presentation">
      <style:graphic-properties draw:stroke="none" draw:fill="none" draw:textarea-vertical-align="middle">
        <text:list-style style:name="Title_2c__20_2_20_Content_20_and_20_Content-title" style:display-name="Title, 2 Content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background" style:display-name="Title Content and 2 Content-background" style:family="presentation">
      <style:graphic-properties draw:stroke="none" draw:fill="solid" draw:fill-color="#ffffff"/>
      <style:text-properties style:letter-kerning="true"/>
    </style:style>
    <style:style style:name="Title_20_Content_20_and_20_2_20_Content-backgroundobjects" style:display-name="Title Content and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Content_20_and_20_2_20_Content-notes" style:display-name="Title Content and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outline1" style:display-name="Title Content and 2 Content-outline1" style:family="presentation">
      <style:graphic-properties draw:stroke="none" draw:fill="none" draw:auto-grow-height="false" draw:fit-to-size="false" style:shrink-to-fit="true">
        <text:list-style style:name="Title_20_Content_20_and_20_2_20_Content-outline1" style:display-name="Title Content and 2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outline2" style:display-name="Title Content and 2 Content-outline2" style:family="presentation" style:parent-style-name="Title_20_Content_20_and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Content_20_and_20_2_20_Content-outline3" style:display-name="Title Content and 2 Content-outline3" style:family="presentation" style:parent-style-name="Title_20_Content_20_and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Content_20_and_20_2_20_Content-outline4" style:display-name="Title Content and 2 Content-outline4" style:family="presentation" style:parent-style-name="Title_20_Content_20_and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Content_20_and_20_2_20_Content-outline5" style:display-name="Title Content and 2 Content-outline5" style:family="presentation" style:parent-style-name="Title_20_Content_20_and_20_2_20_Content-outline4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6" style:display-name="Title Content and 2 Content-outline6" style:family="presentation" style:parent-style-name="Title_20_Content_20_and_20_2_20_Content-outline5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7" style:display-name="Title Content and 2 Content-outline7" style:family="presentation" style:parent-style-name="Title_20_Content_20_and_20_2_20_Content-outline6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8" style:display-name="Title Content and 2 Content-outline8" style:family="presentation" style:parent-style-name="Title_20_Content_20_and_20_2_20_Content-outline7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9" style:display-name="Title Content and 2 Content-outline9" style:family="presentation" style:parent-style-name="Title_20_Content_20_and_20_2_20_Content-outline8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subtitle" style:display-name="Title Content and 2 Content-subtitle" style:family="presentation">
      <style:graphic-properties draw:stroke="none" draw:fill="none" draw:textarea-vertical-align="middle">
        <text:list-style style:name="Title_20_Content_20_and_20_2_20_Content-subtitle" style:display-name="Title Content and 2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title" style:display-name="Title Content and 2 Content-title" style:family="presentation">
      <style:graphic-properties draw:stroke="none" draw:fill="none" draw:textarea-vertical-align="middle">
        <text:list-style style:name="Title_20_Content_20_and_20_2_20_Content-title" style:display-name="Title Content and 2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c__20_2_20_Content_20_over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c__20_2_20_Content_20_over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_2c__20_Content_20_over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c__20_Content_20_over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c__20_4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_2c__20_4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Title_2c__20_6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le_2c__20_6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Title_2c__20_2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Title_20_Onl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Centered_20_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Centered_20_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Title_2c__20_2_20_Content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Title_2c__20_2_20_Content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Title_20_Content_20_and_20_2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Title_20_Content_20_and_20_2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2_20_Content_20_over_20_Content" style:display-name="Title, 2 Content over Content" style:page-layout-name="PM1" draw:style-name="Mdp1">
      <draw:frame draw:name="PlaceHolder 1" presentation:style-name="Title_2c__20_2_20_Content_20_over_20_Content-title" draw:layer="backgroundobjects" svg:width="25.199cm" svg:height="3.504cm" svg:x="1.4cm" svg:y="0.837cm" presentation:class="title" presentation:placeholder="true" presentation:user-transformed="true">
        <draw:text-box/>
      </draw:frame>
      <draw:frame draw:name="PlaceHolder 2" presentation:style-name="Title_2c__20_2_20_Content_20_over_20_Content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PlaceHolder 3" presentation:style-name="Title_2c__20_2_20_Content_20_over_20_Content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PlaceHolder 4" presentation:style-name="Title_2c__20_2_20_Content_20_over_20_Content-outline1" draw:layer="backgroundobjects" svg:width="25.199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Title_2c__20_2_20_Content_20_over_20_Content-title" draw:layer="backgroundobjects" svg:width="19.798cm" svg:height="11.136cm" svg:x="0.6cm" svg:y="2.257cm" presentation:class="page"/>
        <draw:frame presentation:style-name="Title_2c__20_2_20_Content_20_over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20_over_20_Content" style:display-name="Title, Content over Content" style:page-layout-name="PM1" draw:style-name="Mdp1">
      <draw:frame draw:name="PlaceHolder 1" presentation:style-name="Title_2c__20_Content_20_over_20_Content-title" draw:layer="backgroundobjects" svg:width="25.199cm" svg:height="3.504cm" svg:x="1.4cm" svg:y="0.837cm" presentation:class="title" presentation:placeholder="true" presentation:user-transformed="true">
        <draw:text-box/>
      </draw:frame>
      <draw:frame draw:name="PlaceHolder 2" presentation:style-name="Title_2c__20_Content_20_over_20_Content-outline1" draw:layer="backgroundobjects" svg:width="25.199cm" svg:height="5.807cm" svg:x="1.4cm" svg:y="4.913cm" presentation:class="outline" presentation:placeholder="true" presentation:user-transformed="true">
        <draw:text-box/>
      </draw:frame>
      <draw:frame draw:name="PlaceHolder 3" presentation:style-name="Title_2c__20_Content_20_over_20_Content-outline1" draw:layer="backgroundobjects" svg:width="25.199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Title_2c__20_Content_20_over_20_Content-title" draw:layer="backgroundobjects" svg:width="0.001cm" svg:height="0.001cm" svg:x="0cm" svg:y="2.257cm" presentation:class="page"/>
        <draw:frame presentation:style-name="Title_2c__20_Content_20_over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4_20_Content" style:display-name="Title, 4 Content" style:page-layout-name="PM1" draw:style-name="Mdp1">
      <draw:frame draw:name="PlaceHolder 1" presentation:style-name="Title_2c__20_4_20_Content-title" draw:layer="backgroundobjects" svg:width="25.199cm" svg:height="3.504cm" svg:x="1.4cm" svg:y="0.837cm" presentation:class="title" presentation:placeholder="true" presentation:user-transformed="true">
        <draw:text-box/>
      </draw:frame>
      <draw:frame draw:name="PlaceHolder 2" presentation:style-name="Title_2c__20_4_20_Content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PlaceHolder 3" presentation:style-name="Title_2c__20_4_20_Content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PlaceHolder 4" presentation:style-name="Title_2c__20_4_20_Content-outline1" draw:layer="backgroundobjects" svg:width="12.296cm" svg:height="5.807cm" svg:x="1.4cm" svg:y="11.274cm" presentation:class="outline" presentation:placeholder="true" presentation:user-transformed="true">
        <draw:text-box/>
      </draw:frame>
      <draw:frame draw:name="PlaceHolder 5" presentation:style-name="Title_2c__20_4_20_Content-outline1" draw:layer="backgroundobjects" svg:width="12.296cm" svg:height="5.807cm" svg:x="14.313cm" svg:y="11.274cm" presentation:class="outline" presentation:placeholder="true" presentation:user-transformed="true">
        <draw:text-box/>
      </draw:frame>
      <presentation:notes style:page-layout-name="PM2">
        <draw:page-thumbnail presentation:style-name="Title_2c__20_4_20_Content-title" draw:layer="backgroundobjects" svg:width="0.001cm" svg:height="0.001cm" svg:x="0cm" svg:y="2.257cm" presentation:class="page"/>
        <draw:frame presentation:style-name="Title_2c__20_4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6_20_Content" style:display-name="Title, 6 Content" style:page-layout-name="PM1" draw:style-name="Mdp1">
      <draw:frame draw:name="PlaceHolder 1" presentation:style-name="Title_2c__20_6_20_Content-title" draw:layer="backgroundobjects" svg:width="25.199cm" svg:height="3.504cm" svg:x="1.4cm" svg:y="0.837cm" presentation:class="title" presentation:placeholder="true" presentation:user-transformed="true">
        <draw:text-box/>
      </draw:frame>
      <draw:frame draw:name="PlaceHolder 2" presentation:style-name="Title_2c__20_6_20_Content-outline1" draw:layer="backgroundobjects" svg:width="8.113cm" svg:height="5.807cm" svg:x="1.4cm" svg:y="4.913cm" presentation:class="outline" presentation:placeholder="true" presentation:user-transformed="true">
        <draw:text-box/>
      </draw:frame>
      <draw:frame draw:name="PlaceHolder 3" presentation:style-name="Title_2c__20_6_20_Content-outline1" draw:layer="backgroundobjects" svg:width="8.113cm" svg:height="5.807cm" svg:x="9.921cm" svg:y="4.913cm" presentation:class="outline" presentation:placeholder="true" presentation:user-transformed="true">
        <draw:text-box/>
      </draw:frame>
      <draw:frame draw:name="PlaceHolder 4" presentation:style-name="Title_2c__20_6_20_Content-outline1" draw:layer="backgroundobjects" svg:width="8.113cm" svg:height="5.807cm" svg:x="18.442cm" svg:y="4.913cm" presentation:class="outline" presentation:placeholder="true" presentation:user-transformed="true">
        <draw:text-box/>
      </draw:frame>
      <draw:frame draw:name="PlaceHolder 5" presentation:style-name="Title_2c__20_6_20_Content-outline1" draw:layer="backgroundobjects" svg:width="8.113cm" svg:height="5.807cm" svg:x="1.4cm" svg:y="11.274cm" presentation:class="outline" presentation:placeholder="true" presentation:user-transformed="true">
        <draw:text-box/>
      </draw:frame>
      <draw:frame draw:name="PlaceHolder 6" presentation:style-name="Title_2c__20_6_20_Content-outline1" draw:layer="backgroundobjects" svg:width="8.113cm" svg:height="5.807cm" svg:x="9.921cm" svg:y="11.274cm" presentation:class="outline" presentation:placeholder="true" presentation:user-transformed="true">
        <draw:text-box/>
      </draw:frame>
      <draw:frame draw:name="PlaceHolder 7" presentation:style-name="Title_2c__20_6_20_Content-outline1" draw:layer="backgroundobjects" svg:width="8.113cm" svg:height="5.807cm" svg:x="18.442cm" svg:y="11.274cm" presentation:class="outline" presentation:placeholder="true" presentation:user-transformed="true">
        <draw:text-box/>
      </draw:frame>
      <presentation:notes style:page-layout-name="PM2">
        <draw:page-thumbnail presentation:style-name="Title_2c__20_6_20_Content-title" draw:layer="backgroundobjects" svg:width="0.001cm" svg:height="0.001cm" svg:x="0cm" svg:y="2.257cm" presentation:class="page"/>
        <draw:frame presentation:style-name="Title_2c__20_6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presentation:notes style:page-layout-name="PM2">
        <draw:page-thumbnail presentation:style-name="Blank_20_Slide-title" draw:layer="backgroundobjects" svg:width="0.001cm" svg:height="0.001cm" svg:x="0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name="PlaceHolder 1" presentation:style-name="Title_20_Slide-title" draw:layer="backgroundobjects" svg:width="25.199cm" svg:height="3.504cm" svg:x="1.4cm" svg:y="0.837cm" presentation:class="title" presentation:placeholder="true" presentation:user-transformed="true">
        <draw:text-box/>
      </draw:frame>
      <presentation:notes style:page-layout-name="PM2">
        <draw:page-thumbnail presentation:style-name="Title_20_Slide-title" draw:layer="backgroundobjects" svg:width="0.001cm" svg:height="0.001cm" svg:x="0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5.199cm" svg:height="3.504cm" svg:x="1.4cm" svg:y="0.83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9cm" svg:height="12.177cm" svg:x="1.4cm" svg:y="4.913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0.001cm" svg:height="0.001cm" svg:x="0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2_20_Content" style:display-name="Title, 2 Content" style:page-layout-name="PM1" draw:style-name="Mdp1">
      <draw:frame draw:name="PlaceHolder 1" presentation:style-name="Title_2c__20_2_20_Content-title" draw:layer="backgroundobjects" svg:width="25.199cm" svg:height="3.504cm" svg:x="1.4cm" svg:y="0.837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12.296cm" svg:height="12.177cm" svg:x="1.4cm" svg:y="4.913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2.296cm" svg:height="12.177cm" svg:x="14.313cm" svg:y="4.913cm" presentation:class="outline" presentation:placeholder="true" presentation:user-transformed="true">
        <draw:text-box/>
      </draw:frame>
      <presentation:notes style:page-layout-name="PM2">
        <draw:page-thumbnail presentation:style-name="Title_2c__20_2_20_Content-title" draw:layer="backgroundobjects" svg:width="0.001cm" svg:height="0.001cm" svg:x="0cm" svg:y="2.257cm" presentation:class="page"/>
        <draw:frame presentation:style-name="Title_2c__20_2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PlaceHolder 1" presentation:style-name="Title_20_Only-title" draw:layer="backgroundobjects" svg:width="25.199cm" svg:height="3.504cm" svg:x="1.4cm" svg:y="0.837cm" presentation:class="title" presentation:placeholder="true" presentation:user-transformed="true">
        <draw:text-box/>
      </draw:frame>
      <presentation:notes style:page-layout-name="PM2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entered_20_Text" style:display-name="Centered Text" style:page-layout-name="PM1" draw:style-name="Mdp1">
      <presentation:notes style:page-layout-name="PM2">
        <draw:page-thumbnail presentation:style-name="Centered_20_Text-title" draw:layer="backgroundobjects" svg:width="0.001cm" svg:height="0.001cm" svg:x="0cm" svg:y="2.257cm" presentation:class="page"/>
        <draw:frame presentation:style-name="Centere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2_20_Content_20_and_20_Content" style:display-name="Title, 2 Content and Content" style:page-layout-name="PM1" draw:style-name="Mdp1">
      <draw:frame draw:name="PlaceHolder 1" presentation:style-name="Title_2c__20_2_20_Content_20_and_20_Content-title" draw:layer="backgroundobjects" svg:width="25.199cm" svg:height="3.504cm" svg:x="1.4cm" svg:y="0.837cm" presentation:class="title" presentation:placeholder="true" presentation:user-transformed="true">
        <draw:text-box/>
      </draw:frame>
      <draw:frame draw:name="PlaceHolder 2" presentation:style-name="Title_2c__20_2_20_Content_20_and_20_Content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PlaceHolder 3" presentation:style-name="Title_2c__20_2_20_Content_20_and_20_Content-outline1" draw:layer="backgroundobjects" svg:width="12.296cm" svg:height="12.177cm" svg:x="14.313cm" svg:y="4.913cm" presentation:class="outline" presentation:placeholder="true" presentation:user-transformed="true">
        <draw:text-box/>
      </draw:frame>
      <draw:frame draw:name="PlaceHolder 4" presentation:style-name="Title_2c__20_2_20_Content_20_and_20_Content-outline1" draw:layer="backgroundobjects" svg:width="12.296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Title_2c__20_2_20_Content_20_and_20_Content-title" draw:layer="backgroundobjects" svg:width="0.001cm" svg:height="0.001cm" svg:x="0cm" svg:y="2.257cm" presentation:class="page"/>
        <draw:frame presentation:style-name="Title_2c__20_2_20_Content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Content_20_and_20_2_20_Content" style:display-name="Title Content and 2 Content" style:page-layout-name="PM1" draw:style-name="Mdp1">
      <draw:frame draw:name="PlaceHolder 1" presentation:style-name="Title_20_Content_20_and_20_2_20_Content-title" draw:layer="backgroundobjects" svg:width="25.199cm" svg:height="3.504cm" svg:x="1.4cm" svg:y="0.837cm" presentation:class="title" presentation:placeholder="true" presentation:user-transformed="true">
        <draw:text-box/>
      </draw:frame>
      <draw:frame draw:name="PlaceHolder 2" presentation:style-name="Title_20_Content_20_and_20_2_20_Content-outline1" draw:layer="backgroundobjects" svg:width="12.296cm" svg:height="12.177cm" svg:x="1.4cm" svg:y="4.913cm" presentation:class="outline" presentation:placeholder="true" presentation:user-transformed="true">
        <draw:text-box/>
      </draw:frame>
      <draw:frame draw:name="PlaceHolder 3" presentation:style-name="Title_20_Content_20_and_20_2_20_Content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PlaceHolder 4" presentation:style-name="Title_20_Content_20_and_20_2_20_Content-outline1" draw:layer="backgroundobjects" svg:width="12.296cm" svg:height="5.807cm" svg:x="14.313cm" svg:y="11.274cm" presentation:class="outline" presentation:placeholder="true" presentation:user-transformed="true">
        <draw:text-box/>
      </draw:frame>
      <presentation:notes style:page-layout-name="PM2">
        <draw:page-thumbnail presentation:style-name="Title_20_Content_20_and_20_2_20_Content-title" draw:layer="backgroundobjects" svg:width="0.001cm" svg:height="0.001cm" svg:x="0cm" svg:y="2.257cm" presentation:class="page"/>
        <draw:frame presentation:style-name="Title_20_Content_20_and_20_2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7-25T20:56:15</meta:creation-date>
    <meta:initial-creator>Levy, Simon</meta:initial-creator>
    <dc:language>en-US</dc:language>
    <dc:date>2026-04-11T21:25:13.164559347</dc:date>
    <meta:editing-cycles>50</meta:editing-cycles>
    <dc:title>PowerPoint Presentation</dc:title>
    <meta:editing-duration>P1DT3H13M17S</meta:editing-duration>
    <meta:generator>LibreOffice/7.3.7.2$Linux_X86_64 LibreOffice_project/30$Build-2</meta:generator>
    <meta:document-statistic meta:object-count="155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